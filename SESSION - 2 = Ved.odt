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SESSION - 2(Ved)</text:span></text:p>
      <text:p text:style-name="P2"><text:span text:style-name="T2"/></text:p>
      <text:p text:style-name="P2"><text:span text:style-name="T2">Q.1) Create a class called Playlist with properties: name (string), createdOn (date), and isPublic (boolean). Instantiate an object of Playlist and print all its properties.</text:span></text:p>
      <text:p text:style-name="P2"><text:span text:style-name="T2">Ans).</text:span></text:p>
      <text:p text:style-name="P2"><text:span text:style-name="T3"><text:s/>#include &lt;iostream&gt;</text:span></text:p>
      <text:p text:style-name="P2"><text:span text:style-name="T3">#include &lt;string&gt;</text:span></text:p>
      <text:p text:style-name="P2"><text:span text:style-name="T3">using namespace std;</text:span></text:p>
      <text:p text:style-name="P2"><text:span text:style-name="T3">class Playlist {</text:span></text:p>
      <text:p text:style-name="P2"><text:span text:style-name="T3">public:</text:span></text:p>
      <text:p text:style-name="P2"><text:span text:style-name="T3"><text:s text:c="4"/>string name;</text:span></text:p>
      <text:p text:style-name="P2"><text:span text:style-name="T3"><text:s text:c="4"/>string createdOn; </text:span></text:p>
      <text:p text:style-name="P2"><text:span text:style-name="T3"><text:s text:c="4"/>bool isPublic;</text:span></text:p>
      <text:p text:style-name="P2"><text:span text:style-name="T3"><text:s text:c="4"/>void display() {</text:span></text:p>
      <text:p text:style-name="P2"><text:span text:style-name="T3"><text:s text:c="8"/>cout &lt;&lt; "Playlist Name: " &lt;&lt; name &lt;&lt; endl;</text:span></text:p>
      <text:p text:style-name="P2"><text:span text:style-name="T3"><text:s text:c="8"/>cout &lt;&lt; "Created On: " &lt;&lt; createdOn &lt;&lt; endl;</text:span></text:p>
      <text:p text:style-name="P2"><text:span text:style-name="T3"><text:s text:c="8"/>cout &lt;&lt; "Is Public: " &lt;&lt; (isPublic ? "Yes" : "No") &lt;&lt; endl;</text:span></text:p>
      <text:p text:style-name="P2"><text:span text:style-name="T3"><text:s text:c="4"/>}</text:span></text:p>
      <text:p text:style-name="P2"><text:span text:style-name="T3">};</text:span></text:p>
      <text:p text:style-name="P2"><text:span text:style-name="T3">int main() {</text:span></text:p>
      <text:p text:style-name="P2"><text:span text:style-name="T3"><text:s text:c="4"/>Playlist p1;</text:span></text:p>
      <text:p text:style-name="P2"><text:span text:style-name="T3"><text:s text:c="4"/>p1.name = "My Favorites";</text:span></text:p>
      <text:p text:style-name="P2"><text:span text:style-name="T3"><text:s text:c="4"/>p1.createdOn = "2026-06-23";</text:span></text:p>
      <text:p text:style-name="P2"><text:span text:style-name="T3"><text:s text:c="4"/>p1.isPublic = true;</text:span></text:p>
      <text:p text:style-name="P2"><text:span text:style-name="T3"><text:s text:c="4"/>p1.display();</text:span></text:p>
      <text:p text:style-name="P2"><text:span text:style-name="T3"><text:s text:c="4"/>return 0;</text:span></text:p>
      <text:p text:style-name="P2"><text:span text:style-name="T3">}</text:span></text:p>
      <text:p text:style-name="P2"><text:span text:style-name="T4">Output:</text:span></text:p>
      <text:p text:style-name="P2"><text:span text:style-name="T4">Playlist Name: My Favorites</text:span></text:p>
      <text:p text:style-name="P2"><text:span text:style-name="T4">Created On: 2026-06-23</text:span></text:p>
      <text:p text:style-name="P2"><text:span text:style-name="T4">Is Public: Yes</text:span></text:p>
      <text:p text:style-name="P2"><text:span text:style-name="T4"/></text:p>
      <text:p text:style-name="P2"><text:span text:style-name="T4">Q.2) Add a member function to your Playlist class named togglePublic() that switches isPublic between true and false each time it is called. Demonstrate by toggling the value twice and printing the result each time.</text:span></text:p>
      <text:p text:style-name="P2"><text:span text:style-name="T4">Ans). </text:span></text:p>
      <text:p text:style-name="P2"><text:span text:style-name="T5">#include &lt;iostream&gt;</text:span></text:p>
      <text:p text:style-name="P2"><text:span text:style-name="T5">#include &lt;string&gt;</text:span></text:p>
      <text:p text:style-name="P2"><text:span text:style-name="T5">using namespace std;</text:span></text:p>
      <text:p text:style-name="P2"><text:span text:style-name="T5">class Playlist {</text:span></text:p>
      <text:p text:style-name="P2"><text:span text:style-name="T5">public:</text:span></text:p>
      <text:p text:style-name="P2"><text:span text:style-name="T5"><text:s text:c="4"/>string name;</text:span></text:p>
      <text:p text:style-name="P2"><text:span text:style-name="T5"><text:s text:c="4"/>string createdOn;</text:span></text:p>
      <text:p text:style-name="P2"><text:span text:style-name="T5"><text:s text:c="4"/>bool isPublic;</text:span></text:p>
      <text:p text:style-name="P2"><text:span text:style-name="T5"><text:s text:c="4"/>void togglePublic() {</text:span></text:p>
      <text:p text:style-name="P2"><text:span text:style-name="T5"><text:s text:c="8"/>isPublic = !isPublic;</text:span></text:p>
      <text:p text:style-name="P2"><text:span text:style-name="T5"><text:s text:c="4"/>}</text:span></text:p>
      <text:p text:style-name="P2"><text:span text:style-name="T5"><text:s text:c="4"/>void display() {</text:span></text:p>
      <text:p text:style-name="P2"><text:span text:style-name="T5"><text:s text:c="8"/>cout &lt;&lt; "Playlist Name: " &lt;&lt; name &lt;&lt; endl;</text:span></text:p>
      <text:p text:style-name="P2"><text:span text:style-name="T5"><text:s text:c="8"/>cout &lt;&lt; "Created On: " &lt;&lt; createdOn &lt;&lt; endl;</text:span></text:p>
      <text:p text:style-name="P2"><text:span text:style-name="T5"><text:s text:c="8"/>cout &lt;&lt; "Is Public: " &lt;&lt; (isPublic ? "true" : "false") &lt;&lt; endl;</text:span></text:p>
      <text:p text:style-name="P2"><text:span text:style-name="T5"><text:s text:c="8"/>cout &lt;&lt; endl;</text:span></text:p>
      <text:p text:style-name="P2"><text:span text:style-name="T5"><text:s text:c="4"/>}</text:span></text:p>
      <text:p text:style-name="P2"><text:span text:style-name="T5">};</text:span></text:p>
      <text:p text:style-name="P2"><text:span text:style-name="T5">int main() {</text:span></text:p>
      <text:p text:style-name="P2"><text:span text:style-name="T5"><text:s text:c="4"/>Playlist p1;</text:span></text:p>
      <text:p text:style-name="P2"><text:span text:style-name="T5"><text:s text:c="4"/>p1.name = "My Favorites";</text:span></text:p>
      <text:p text:style-name="P2"><text:span text:style-name="T5"><text:s text:c="4"/>p1.createdOn = "2026-06-23";</text:span></text:p>
      <text:p text:style-name="P2"><text:span text:style-name="T5"><text:s text:c="4"/>p1.isPublic = true;</text:span></text:p>
      <text:p text:style-name="P2"><text:span text:style-name="T5"><text:s text:c="4"/>cout &lt;&lt; "Initial State:" &lt;&lt; endl;</text:span></text:p>
      <text:p text:style-name="P2"><text:span text:style-name="T5"><text:s text:c="4"/>p1.display();</text:span></text:p>
      <text:p text:style-name="P2"><text:span text:style-name="T5"><text:s text:c="4"/>p1.togglePublic();</text:span></text:p>
      <text:p text:style-name="P2"><text:span text:style-name="T5"><text:s text:c="4"/>cout &lt;&lt; "After 1st Toggle:" &lt;&lt; endl;</text:span></text:p>
      <text:p text:style-name="P2"><text:span text:style-name="T5"><text:s text:c="4"/>p1.display();</text:span></text:p>
      <text:p text:style-name="P2"><text:span text:style-name="T5"><text:s text:c="4"/>p1.togglePublic();</text:span></text:p>
      <text:p text:style-name="P2"><text:span text:style-name="T5"><text:s text:c="4"/>cout &lt;&lt; "After 2nd Toggle:" &lt;&lt; endl;</text:span></text:p>
      <text:p text:style-name="P2"><text:span text:style-name="T5"><text:s text:c="4"/>p1.display();</text:span></text:p>
      <text:p text:style-name="P2"><text:span text:style-name="T5"><text:s text:c="4"/>return 0;</text:span></text:p>
      <text:p text:style-name="P2"><text:span text:style-name="T5">}</text:span></text:p>
      <text:p text:style-name="P2"><text:span text:style-name="T5"><text:line-break/></text:span><text:span text:style-name="T6">Output: </text:span></text:p>
      <text:p text:style-name="P2"><text:span text:style-name="T6">Initial State:</text:span></text:p>
      <text:p text:style-name="P2"><text:span text:style-name="T6">Playlist Name: My Favorites</text:span></text:p>
      <text:p text:style-name="P2"><text:span text:style-name="T6">Created On: 2026-06-23</text:span></text:p>
      <text:p text:style-name="P2"><text:span text:style-name="T6">Is Public: true</text:span></text:p>
      <text:p text:style-name="P2"><text:span text:style-name="T6"/></text:p>
      <text:p text:style-name="P2"><text:span text:style-name="T6">After 1st Toggle:</text:span></text:p>
      <text:p text:style-name="P2"><text:span text:style-name="T6">Playlist Name: My Favorites</text:span></text:p>
      <text:p text:style-name="P2"><text:span text:style-name="T6">Created On: 2026-06-23</text:span></text:p>
      <text:p text:style-name="P2"><text:span text:style-name="T6">Is Public: false</text:span></text:p>
      <text:p text:style-name="P2"><text:span text:style-name="T6"/></text:p>
      <text:p text:style-name="P2"><text:span text:style-name="T6">After 2nd Toggle:</text:span></text:p>
      <text:p text:style-name="P2"><text:span text:style-name="T6">Playlist Name: My Favorites</text:span></text:p>
      <text:p text:style-name="P2"><text:span text:style-name="T6">Created On: 2026-06-23</text:span></text:p>
      <text:p text:style-name="P2"><text:span text:style-name="T6">Is Public: true</text:span></text:p>
      <text:p text:style-name="P2"><text:span text:style-name="T6"/></text:p>
      <text:p text:style-name="P2"><text:span text:style-name="T6">Q.3) Create a class called FoodOrder with properties: orderId (number), restaurantName (string), and isDelivered (boolean). Write a member function markDelivered() that sets isDelivered to true and prints a message. Instantiate FoodOrder and call markDelivered().</text:span></text:p>
      <text:p text:style-name="P2"><text:span text:style-name="T6">Ans). </text:span></text:p>
      <text:p text:style-name="P2"><text:span text:style-name="T7">#include &lt;iostream&gt;</text:span></text:p>
      <text:p text:style-name="P2"><text:span text:style-name="T7">#include &lt;string&gt;</text:span></text:p>
      <text:p text:style-name="P2"><text:span text:style-name="T7">using namespace std;</text:span></text:p>
      <text:p text:style-name="P2"><text:span text:style-name="T7">class FoodOrder {</text:span></text:p>
      <text:p text:style-name="P2"><text:span text:style-name="T7">public:</text:span></text:p>
      <text:p text:style-name="P2"><text:span text:style-name="T7"><text:s text:c="4"/>int orderId;</text:span></text:p>
      <text:p text:style-name="P2"><text:span text:style-name="T7"><text:s text:c="4"/>string restaurantName;</text:span></text:p>
      <text:p text:style-name="P2"><text:span text:style-name="T7"><text:s text:c="4"/>bool isDelivered;</text:span></text:p>
      <text:p text:style-name="P2"><text:span text:style-name="T7"><text:s text:c="4"/>void markDelivered() {</text:span></text:p>
      <text:p text:style-name="P2"><text:span text:style-name="T7"><text:s text:c="8"/>isDelivered = true;</text:span></text:p>
      <text:p text:style-name="P2"><text:span text:style-name="T7"><text:s text:c="8"/>cout &lt;&lt; "Order " &lt;&lt; orderId</text:span></text:p>
      <text:p text:style-name="P2"><text:span text:style-name="T7"><text:s text:c="13"/>&lt;&lt; " from " &lt;&lt; restaurantName</text:span></text:p>
      <text:p text:style-name="P2"><text:span text:style-name="T7"><text:s text:c="13"/>&lt;&lt; " has been delivered." &lt;&lt; endl;</text:span></text:p>
      <text:p text:style-name="P2"><text:span text:style-name="T7"><text:s text:c="4"/>}</text:span></text:p>
      <text:p text:style-name="P2"><text:span text:style-name="T7">};</text:span></text:p>
      <text:p text:style-name="P2"><text:span text:style-name="T7">int main() {</text:span></text:p>
      <text:p text:style-name="P2"><text:span text:style-name="T7"><text:s text:c="4"/>FoodOrder order1;</text:span></text:p>
      <text:p text:style-name="P2"><text:span text:style-name="T7"><text:s text:c="4"/>order1.orderId = 101;</text:span></text:p>
      <text:p text:style-name="P2"><text:span text:style-name="T7"><text:s text:c="4"/>order1.restaurantName = "Pizza Palace";</text:span></text:p>
      <text:p text:style-name="P2"><text:span text:style-name="T7"><text:s text:c="4"/>order1.isDelivered = false;</text:span></text:p>
      <text:p text:style-name="P2"><text:span text:style-name="T7"><text:s text:c="4"/>order1.markDelivered();</text:span></text:p>
      <text:p text:style-name="P2"><text:span text:style-name="T7"><text:s text:c="4"/>cout &lt;&lt; "Delivery Status: "</text:span></text:p>
      <text:p text:style-name="P2"><text:span text:style-name="T7"><text:s text:c="9"/>&lt;&lt; (order1.isDelivered ? "Delivered" : "Not Delivered")</text:span></text:p>
      <text:p text:style-name="P2"><text:span text:style-name="T7"><text:s text:c="9"/>&lt;&lt; endl;</text:span></text:p>
      <text:p text:style-name="P2"><text:span text:style-name="T7"><text:s text:c="4"/>return 0;</text:span></text:p>
      <text:p text:style-name="P2"><text:span text:style-name="T7">}</text:span></text:p>
      <text:p text:style-name="P2"><text:span text:style-name="T8"><text:line-break/>Output: </text:span></text:p>
      <text:p text:style-name="P2"><text:span text:style-name="T8">Order 101 from Pizza Palace has been delivered.</text:span></text:p>
      <text:p text:style-name="P2"><text:span text:style-name="T8">Delivery Status: Delivered</text:span></text:p>
      <text:p text:style-name="P2"><text:span text:style-name="T8"/></text:p>
      <text:p text:style-name="P2"><text:span text:style-name="T8">Q.4) Extend your Playlist class to include a member function addSong(songTitle) that adds the song title to an array property called songs. Demonstrate by adding three song titles and displaying the updated songs list.&lt;br&gt;&lt;br&gt;&lt;em&gt;&lt;strong&gt;Hint:&lt;/strong&gt; Initialize songs as an empty array inside the constructor.&lt;/em&gt;<text:line-break/>Ans). </text:span></text:p>
      <text:p text:style-name="P2"><text:span text:style-name="T9">#include &lt;iostream&gt;</text:span></text:p>
      <text:p text:style-name="P2"><text:span text:style-name="T9">#include &lt;vector&gt;</text:span></text:p>
      <text:p text:style-name="P2"><text:span text:style-name="T9">#include &lt;string&gt;</text:span></text:p>
      <text:p text:style-name="P2"><text:span text:style-name="T9">using namespace std;</text:span></text:p>
      <text:p text:style-name="P2"><text:span text:style-name="T9">class Playlist {</text:span></text:p>
      <text:p text:style-name="P2"><text:span text:style-name="T9">public:</text:span></text:p>
      <text:p text:style-name="P2"><text:span text:style-name="T9"><text:s text:c="4"/>string name;</text:span></text:p>
      <text:p text:style-name="P2"><text:span text:style-name="T9"><text:s text:c="4"/>string createdOn;</text:span></text:p>
      <text:p text:style-name="P2"><text:span text:style-name="T9"><text:s text:c="4"/>bool isPublic;</text:span></text:p>
      <text:p text:style-name="P2"><text:span text:style-name="T9"><text:s text:c="4"/>vector&lt;string&gt; songs;</text:span></text:p>
      <text:p text:style-name="P2"><text:span text:style-name="T9"><text:s text:c="4"/>Playlist() {</text:span></text:p>
      <text:p text:style-name="P2"><text:span text:style-name="T9"><text:s text:c="8"/>songs = {};</text:span></text:p>
      <text:p text:style-name="P2"><text:span text:style-name="T9"><text:s text:c="4"/>}</text:span></text:p>
      <text:p text:style-name="P2"><text:span text:style-name="T9"><text:s text:c="4"/>void addSong(string songTitle) {</text:span></text:p>
      <text:p text:style-name="P2"><text:span text:style-name="T9"><text:s text:c="8"/>songs.push_back(songTitle);</text:span></text:p>
      <text:p text:style-name="P2"><text:span text:style-name="T9"><text:s text:c="4"/>}</text:span></text:p>
      <text:p text:style-name="P2"><text:span text:style-name="T9"><text:s text:c="4"/>void displaySongs() {</text:span></text:p>
      <text:p text:style-name="P2"><text:span text:style-name="T9"><text:s text:c="8"/>cout &lt;&lt; "Songs in Playlist:" &lt;&lt; endl;</text:span></text:p>
      <text:p text:style-name="P2"><text:span text:style-name="T9"><text:s text:c="8"/>for (int i = 0; i &lt; songs.size(); i++) {</text:span></text:p>
      <text:p text:style-name="P2"><text:span text:style-name="T9"><text:s text:c="12"/>cout &lt;&lt; i + 1 &lt;&lt; ". " &lt;&lt; songs[i] &lt;&lt; endl;</text:span></text:p>
      <text:p text:style-name="P2"><text:span text:style-name="T9"><text:s text:c="8"/>}</text:span></text:p>
      <text:p text:style-name="P2"><text:span text:style-name="T9"><text:s text:c="4"/>}</text:span></text:p>
      <text:p text:style-name="P2"><text:span text:style-name="T9">};</text:span></text:p>
      <text:p text:style-name="P2"><text:span text:style-name="T9"/></text:p>
      <text:p text:style-name="P2"><text:span text:style-name="T9">int main() {</text:span></text:p>
      <text:p text:style-name="P2"><text:span text:style-name="T9"><text:s text:c="4"/>Playlist p1;</text:span></text:p>
      <text:p text:style-name="P2"><text:span text:style-name="T9"><text:s text:c="4"/>p1.name = "My Favorites";</text:span></text:p>
      <text:p text:style-name="P2"><text:span text:style-name="T9"><text:s text:c="4"/>p1.createdOn = "2026-06-23";</text:span></text:p>
      <text:p text:style-name="P2"><text:span text:style-name="T9"><text:s text:c="4"/>p1.isPublic = true;</text:span></text:p>
      <text:p text:style-name="P2"><text:span text:style-name="T9"><text:s text:c="4"/>p1.addSong("Shape of You");</text:span></text:p>
      <text:p text:style-name="P2"><text:span text:style-name="T9"><text:s text:c="4"/>p1.addSong("Believer");</text:span></text:p>
      <text:p text:style-name="P2"><text:span text:style-name="T9"><text:s text:c="4"/>p1.addSong("Perfect");</text:span></text:p>
      <text:p text:style-name="P2"><text:span text:style-name="T9"><text:s text:c="4"/>p1.displaySongs();</text:span></text:p>
      <text:p text:style-name="P2"><text:span text:style-name="T9"><text:s text:c="4"/>return 0;</text:span></text:p>
      <text:p text:style-name="P2"><text:span text:style-name="T9">}</text:span><text:span text:style-name="T10"/></text:p>
      <text:p text:style-name="P2"><text:span text:style-name="T10">Output: </text:span></text:p>
      <text:p text:style-name="P2"><text:span text:style-name="T10">Songs in Playlist:</text:span></text:p>
      <text:p text:style-name="P2"><text:span text:style-name="T10">1. Shape of You</text:span></text:p>
      <text:p text:style-name="P2"><text:span text:style-name="T10">2. Believer</text:span></text:p>
      <text:p text:style-name="P2"><text:span text:style-name="T10">3. Perfect<text:line-break/><text:line-break/>Q.5) Refactor your FoodOrder class so that the constructor takes an object as a parameter (with keys orderId, restaurantName, isDelivered) instead of separate arguments. Update your instantiation code to use this new constructor signature.</text:span></text:p>
      <text:p text:style-name="P2"><text:span text:style-name="T10">Ans).</text:span><text:span text:style-name="T11"><text:s/></text:span></text:p>
      <text:p text:style-name="P2"><text:span text:style-name="T11">#include &lt;iostream&gt;</text:span></text:p>
      <text:p text:style-name="P2"><text:span text:style-name="T11">#include &lt;string&gt;</text:span></text:p>
      <text:p text:style-name="P2"><text:span text:style-name="T11">using namespace std;</text:span></text:p>
      <text:p text:style-name="P2"><text:span text:style-name="T11">struct FoodOrderData {</text:span></text:p>
      <text:p text:style-name="P2"><text:span text:style-name="T11"><text:s text:c="4"/>int orderId;</text:span></text:p>
      <text:p text:style-name="P2"><text:span text:style-name="T11"><text:s text:c="4"/>string restaurantName;</text:span></text:p>
      <text:p text:style-name="P2"><text:span text:style-name="T11"><text:s text:c="4"/>bool isDelivered;</text:span></text:p>
      <text:p text:style-name="P2"><text:span text:style-name="T11">};</text:span></text:p>
      <text:p text:style-name="P2"><text:span text:style-name="T11">class FoodOrder {</text:span></text:p>
      <text:p text:style-name="P2"><text:span text:style-name="T11">public:</text:span></text:p>
      <text:p text:style-name="P2"><text:span text:style-name="T11"><text:s text:c="4"/>int orderId;</text:span></text:p>
      <text:p text:style-name="P2"><text:span text:style-name="T11"><text:s text:c="4"/>string restaurantName;</text:span></text:p>
      <text:p text:style-name="P2"><text:span text:style-name="T11"><text:s text:c="4"/>bool isDelivered;</text:span></text:p>
      <text:p text:style-name="P2"><text:span text:style-name="T11">FoodOrder(FoodOrderData data) {</text:span></text:p>
      <text:p text:style-name="P2"><text:span text:style-name="T11"><text:s text:c="8"/>orderId = data.orderId;</text:span></text:p>
      <text:p text:style-name="P2"><text:span text:style-name="T11"><text:s text:c="8"/>restaurantName = data.restaurantName;</text:span></text:p>
      <text:p text:style-name="P2"><text:span text:style-name="T11"><text:s text:c="8"/>isDelivered = data.isDelivered;</text:span></text:p>
      <text:p text:style-name="P2"><text:span text:style-name="T11"><text:s text:c="4"/>}</text:span></text:p>
      <text:p text:style-name="P2"><text:span text:style-name="T11"><text:s text:c="4"/>void markDelivered() {</text:span></text:p>
      <text:p text:style-name="P2"><text:span text:style-name="T11"><text:s text:c="8"/>isDelivered = true;</text:span></text:p>
      <text:p text:style-name="P2"><text:span text:style-name="T11"><text:s text:c="8"/>cout &lt;&lt; "Order " &lt;&lt; orderId</text:span></text:p>
      <text:p text:style-name="P2"><text:span text:style-name="T11"><text:s text:c="13"/>&lt;&lt; " from " &lt;&lt; restaurantName</text:span></text:p>
      <text:p text:style-name="P2"><text:span text:style-name="T11"><text:s text:c="13"/>&lt;&lt; " has been delivered." &lt;&lt; endl;</text:span></text:p>
      <text:p text:style-name="P2"><text:span text:style-name="T11"><text:s text:c="4"/>}</text:span></text:p>
      <text:p text:style-name="P2"><text:span text:style-name="T11"><text:s text:c="4"/>void display() {</text:span></text:p>
      <text:p text:style-name="P2"><text:span text:style-name="T11"><text:s text:c="8"/>cout &lt;&lt; "Order ID: " &lt;&lt; orderId &lt;&lt; endl;</text:span></text:p>
      <text:p text:style-name="P2"><text:span text:style-name="T11"><text:s text:c="8"/>cout &lt;&lt; "Restaurant: " &lt;&lt; restaurantName &lt;&lt; endl;</text:span></text:p>
      <text:p text:style-name="P2"><text:span text:style-name="T11"><text:s text:c="8"/>cout &lt;&lt; "Delivered: "</text:span></text:p>
      <text:p text:style-name="P2"><text:span text:style-name="T11"><text:s text:c="13"/>&lt;&lt; (isDelivered ? "Yes" : "No") &lt;&lt; endl;</text:span></text:p>
      <text:p text:style-name="P2"><text:span text:style-name="T11"><text:s text:c="4"/>}</text:span></text:p>
      <text:p text:style-name="P2"><text:span text:style-name="T11">};</text:span></text:p>
      <text:p text:style-name="P2"><text:span text:style-name="T11">int main() {</text:span></text:p>
      <text:p text:style-name="P2"><text:span text:style-name="T11"><text:s text:c="4"/>FoodOrderData data = {101, "Pizza Palace", false};</text:span></text:p>
      <text:p text:style-name="P2"><text:span text:style-name="T11"><text:s text:c="4"/>FoodOrder order1(data);</text:span></text:p>
      <text:p text:style-name="P2"><text:span text:style-name="T11">order1.display();</text:span></text:p>
      <text:p text:style-name="P2"><text:span text:style-name="T11"><text:s text:c="4"/>cout &lt;&lt; endl;</text:span></text:p>
      <text:p text:style-name="P2"><text:span text:style-name="T11"><text:s text:c="4"/>order1.markDelivered();</text:span></text:p>
      <text:p text:style-name="P2"><text:span text:style-name="T11"><text:s text:c="4"/>order1.display();</text:span></text:p>
      <text:p text:style-name="P2"><text:span text:style-name="T11"><text:s text:c="4"/>return 0;</text:span></text:p>
      <text:p text:style-name="P2"><text:span text:style-name="T11">}</text:span></text:p>
      <text:p text:style-name="P2"><text:span text:style-name="T11"/></text:p>
      <text:p text:style-name="P2"><text:span text:style-name="T12">Output:</text:span></text:p>
      <text:p text:style-name="P2"><text:span text:style-name="T12">Order ID: 101</text:span></text:p>
      <text:p text:style-name="P2"><text:span text:style-name="T12">Restaurant: Pizza Palace</text:span></text:p>
      <text:p text:style-name="P2"><text:span text:style-name="T12">Delivered: No</text:span></text:p>
      <text:p text:style-name="P2"><text:span text:style-name="T12"/></text:p>
      <text:p text:style-name="P2"><text:span text:style-name="T12">Order 101 from Pizza Palace has been delivered.</text:span></text:p>
      <text:p text:style-name="P2"><text:span text:style-name="T12">Order ID: 101</text:span></text:p>
      <text:p text:style-name="P2"><text:span text:style-name="T12">Restaurant: Pizza Palace</text:span></text:p>
      <text:p text:style-name="P2"><text:span text:style-name="T12">Delivered: Yes</text:span><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